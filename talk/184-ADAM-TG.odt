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15pt" style:font-size-asian="15pt" style:font-size-complex="15pt"/>
    </style:style>
    <style:style style:name="P2" style:family="paragraph" style:parent-style-name="Heading_20_1">
      <style:text-properties fo:font-size="15pt" style:font-size-asian="15pt" style:font-size-complex="15pt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2">
      <style:text-properties fo:font-size="14pt" fo:background-color="#dee6ef" style:font-size-asian="18pt" style:font-size-complex="18pt"/>
    </style:style>
    <style:style style:name="P5" style:family="paragraph" style:parent-style-name="Heading_20_2">
      <style:paragraph-properties fo:keep-with-next="always"/>
      <style:text-properties fo:font-size="14pt" fo:background-color="#dee6ef"/>
    </style:style>
    <style:style style:name="P6" style:family="paragraph" style:parent-style-name="Heading_20_2">
      <style:text-properties fo:font-size="14pt" fo:background-color="#dee6ef" style:font-size-asian="14pt" style:font-size-complex="14pt"/>
    </style:style>
    <style:style style:name="P7" style:family="paragraph" style:parent-style-name="Heading_20_2">
      <style:paragraph-properties fo:keep-with-next="always"/>
      <style:text-properties fo:font-size="14pt" fo:background-color="#dee6ef" style:font-size-asian="14pt" style:font-size-complex="14pt"/>
    </style:style>
    <style:style style:name="P8" style:family="paragraph" style:parent-style-name="Quotations">
      <style:paragraph-properties fo:margin-top="0cm" fo:margin-bottom="0cm" style:contextual-spacing="false"/>
      <style:text-properties officeooo:paragraph-rsid="0018569a"/>
    </style:style>
    <style:style style:name="P9" style:family="paragraph" style:parent-style-name="Quotations" style:master-page-name="">
      <loext:graphic-properties draw:fill="none"/>
      <style:paragraph-properties fo:margin-left="1cm" fo:margin-right="1cm" fo:margin-top="0cm" fo:margin-bottom="0cm" style:contextual-spacing="false" fo:text-indent="-0.9cm" style:auto-text-indent="false" style:page-number="auto" fo:background-color="transparent"/>
      <style:text-properties officeooo:paragraph-rsid="0018569a"/>
    </style:style>
    <style:style style:name="P10" style:family="paragraph" style:parent-style-name="Quotations" style:master-page-name="">
      <loext:graphic-properties draw:fill="none"/>
      <style:paragraph-properties fo:margin-left="1cm" fo:margin-right="1cm" fo:margin-top="0cm" fo:margin-bottom="0cm" style:contextual-spacing="false" fo:text-indent="0.499cm" style:auto-text-indent="false" style:page-number="auto" fo:background-color="transparent">
        <style:tab-stops>
          <style:tab-stop style:position="0.494cm"/>
        </style:tab-stops>
      </style:paragraph-properties>
      <style:text-properties officeooo:paragraph-rsid="0018569a"/>
    </style:style>
    <style:style style:name="P11" style:family="paragraph" style:parent-style-name="Quotations">
      <loext:graphic-properties draw:fill="none"/>
      <style:paragraph-properties fo:margin-left="1cm" fo:margin-right="1cm" fo:margin-top="0cm" fo:margin-bottom="0cm" style:contextual-spacing="false" fo:text-indent="0.499cm" style:auto-text-indent="false" fo:background-color="transparent">
        <style:tab-stops>
          <style:tab-stop style:position="0.494cm"/>
        </style:tab-stops>
      </style:paragraph-properties>
      <style:text-properties officeooo:paragraph-rsid="0018569a"/>
    </style:style>
    <style:style style:name="P12" style:family="paragraph" style:parent-style-name="Text_20_body" style:list-style-name="L1"/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9cm" style:auto-text-indent="false" style:page-number="auto" fo:background-color="transparent"/>
      <style:text-properties officeooo:paragraph-rsid="0018569a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9cm" style:auto-text-indent="false" fo:background-color="transparent"/>
      <style:text-properties officeooo:paragraph-rsid="0018569a"/>
    </style:style>
    <style:style style:name="P16" style:family="paragraph" style:parent-style-name="Text_20_body" style:master-page-name="">
      <loext:graphic-properties draw:fill="none"/>
      <style:paragraph-properties fo:margin-left="1.499cm" fo:margin-right="0cm" fo:margin-top="0cm" fo:margin-bottom="0.247cm" style:contextual-spacing="false" fo:line-height="115%" fo:text-indent="-0.499cm" style:auto-text-indent="false" style:page-number="auto" fo:background-color="transparent">
        <style:tab-stops>
          <style:tab-stop style:position="0.921cm"/>
        </style:tab-stops>
      </style:paragraph-properties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#dee6ef" loext:char-shading-value="0" style:font-size-asian="14pt" style:font-size-complex="14pt"/>
    </style:style>
    <style:style style:name="T3" style:family="text">
      <style:text-properties fo:font-size="14pt" fo:background-color="#dee6ef" loext:char-shading-value="0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AHAGI 1 — BAKIT HINDI IYON ANG WAKAS</text:h>
      <text:p text:style-name="P1"/>
      <text:h text:style-name="P6" text:outline-level="2">Panimula</text:h>
      <text:p text:style-name="Text_20_body"><text:span text:style-name="Emphasis">(Gentle, reflective, unhurried.)</text:span></text:p>
      <text:p text:style-name="Text_20_body">Kapag may mahal tayo sa buhay na namatay…parang may pintuan na tuluyang nagsara.</text:p>
      <text:p text:style-name="P13">Tahimik. Mabigat. At parang permanenteng paghihiwalay.</text:p>
      <text:p text:style-name="P14">Maraming tao ang nagsasabi, “That’s the end.”</text:p>
      <text:p text:style-name="P15">Pero totoo ba? <text:span text:style-name="Emphasis">(Pause briefly.)</text:span></text:p>
      <text:p text:style-name="P15"><text:span text:style-name="Emphasis"/></text:p>
      <text:p text:style-name="P17">Basahin natin ang <text:span text:style-name="Strong_20_Emphasis">Roma 6:23</text:span>:</text:p>
      <text:p text:style-name="P8">“Ang kabayaran ng kasalanan ay kamatayan.”</text:p>
      <text:p text:style-name="P8">Pansinin ang salitang <text:span text:style-name="Emphasis">kabayaran.</text:span> <text:span text:style-name="Emphasis">(Slight emphasis.)</text:span></text:p>
      <text:p text:style-name="P8">Ibig sabihin, may dahilan kung bakit may kamatayan.</text:p>
      <text:p text:style-name="P8">Death is not random. May dahilan ito.</text:p>
      <text:p text:style-name="P10">Nagkasala si Adan — at ang result ay kamatayan.</text:p>
      <text:p text:style-name="P11">At dahil doon, namana natin ang kundisyong iyon.</text:p>
      <text:p text:style-name="P11"/>
      <text:p text:style-name="Text_20_body">Ngayon pag-isipan natin:</text:p>
      <text:p text:style-name="P16">Kung ang kamatayan ay penalty ng kasalanan…paano kung ang isang tao ay hindi nagkasala kahit minsan? <text:span text:style-name="Emphasis">(Brief pause.)</text:span></text:p>
      <text:p text:style-name="Text_20_body">May legal claim ba ang kamatayan sa kaniya?</text:p>
      <text:p text:style-name="Horizontal_20_Line"/>
      <text:h text:style-name="P7" text:outline-level="2">Hindi Nagkasala si Jesus</text:h>
      <text:p text:style-name="Text_20_body"><text:span text:style-name="Emphasis">(Structured, confident, logical — steady pace.)</text:span></text:p>
      <text:p text:style-name="P9">Si Jesus ay namuhay nang perpekto.</text:p>
      <text:p text:style-name="P8">Hindi siya nagkasala kahit minsan.</text:p>
      <text:p text:style-name="P8">So logically speaking —<text:line-break/>wala siyang utang na kamatayan.</text:p>
      <text:p text:style-name="Text_20_body"/>
      <text:p text:style-name="Text_20_body">Tingnan ang <text:span text:style-name="Strong_20_Emphasis">Juan 10:18</text:span>.</text:p>
      <text:p text:style-name="P8">Sinabi niya na ibinibigay niya ang buhay niya voluntarily.</text:p>
      <text:p text:style-name="P8">Hindi siya pinilit.</text:p>
      <text:p text:style-name="Text_20_body"/>
      <text:p text:style-name="Text_20_body">Ngayon pansinin ang <text:span text:style-name="Strong_20_Emphasis">Gawa 2:24</text:span>.</text:p>
      <text:p text:style-name="P8">Sinasabi roon na “hindi posible” na mapigilan siya ng kamatayan.</text:p>
      <text:p text:style-name="P8">Bakit hindi posible? <text:span text:style-name="Emphasis">(Pause slightly.)</text:span></text:p>
      <text:p text:style-name="P8">Because Jehovah is just.</text:p>
      <text:p text:style-name="P8">Hindi pinapayagan ng justice na manatili ang parusa kung walang kasalanan.</text:p>
      <text:p text:style-name="P8"/>
      <text:p text:style-name="Text_20_body"/>
      <text:p text:style-name="Text_20_body"><text:soft-page-break/>Death had no rightful claim on Jesus.</text:p>
      <text:p text:style-name="P8">Kaya binuhay siya ni Jehova.</text:p>
      <text:p text:style-name="P8">That resurrection was not just mercy.</text:p>
      <text:p text:style-name="P8">It was justice.</text:p>
      <text:p text:style-name="Horizontal_20_Line"/>
      <text:h text:style-name="P7" text:outline-level="2"/>
      <text:h text:style-name="P6" text:outline-level="2">Legal Right at Ransom</text:h>
      <text:p text:style-name="Text_20_body"><text:span text:style-name="Emphasis">(Clear, progressive reasoning.)</text:span></text:p>
      <text:p text:style-name="Text_20_body">Bilang perpektong tao, may legal right si Jesus na mabuhay magpakailanman.</text:p>
      <text:p text:style-name="P8">Si Adan, nawala iyon.</text:p>
      <text:p text:style-name="P8">Pero kay Jesus, napanatili iyon.</text:p>
      <text:p text:style-name="P8">At imbes na gamitin niya iyon para sa sarili niya…<text:line-break/>isinuko niya. Bakit?</text:p>
      <text:p text:style-name="P8"/>
      <text:p text:style-name="Text_20_body">Para bayaran ang utang na hindi natin kayang bayaran.</text:p>
      <text:p text:style-name="P8">Isang perpektong buhay ang nawala kay Adan.<text:line-break/>Kaya isang perpektong buhay din ang kailangang ibigay.</text:p>
      <text:p text:style-name="P8"/>
      <text:p text:style-name="P8">That’s why after his resurrection,<text:line-break/>iniharap niya kay Jehova ang value ng kaniyang perfect human life.</text:p>
      <text:p text:style-name="P8"/>
      <text:p text:style-name="P8">Justice satisfied.</text:p>
      <text:p text:style-name="P8">Debt cleared.</text:p>
      <text:p text:style-name="Horizontal_20_Line"/>
      <text:h text:style-name="P7" text:outline-level="2">Illustration — Paid in Full</text:h>
      <text:p text:style-name="Text_20_body"><text:span text:style-name="Emphasis">(Calm, grounded.)</text:span></text:p>
      <text:p text:style-name="Text_20_body">Isipin mo na may napakalaki kang utang.</text:p>
      <text:p text:style-name="Text_20_body">Kahit anong trabaho mo, hindi mo kayang bayaran.</text:p>
      <text:p text:style-name="Text_20_body">Tapos may isang tao — hindi niya kasalanan ang utang — pero binayaran niya lahat.</text:p>
      <text:p text:style-name="Text_20_body">Kapag tinanggap na ang bayad, mamamarkahan ang account ng:</text:p>
      <text:p text:style-name="Text_20_body"><text:span text:style-name="Strong_20_Emphasis">Paid in Full.</text:span> <text:span text:style-name="Emphasis">(Let this land.)</text:span></text:p>
      <text:p text:style-name="Text_20_body">Wala nang nakasabit.<text:line-break/>Wala nang hahabulin.</text:p>
      <text:p text:style-name="Text_20_body">Ganiyan ang ginawa ni Jesus.</text:p>
      <text:p text:style-name="Text_20_body">Wala siyang utang na kamatayan.</text:p>
      <text:p text:style-name="Text_20_body">Pero binayaran niya ang atin.</text:p>
      <text:p text:style-name="Text_20_body">At tinanggap iyon ni Jehova.</text:p>
      <text:p text:style-name="Text_20_body">Kaya may legal basis na ngayon para alisin ang minanang kasalanan.</text:p>
      <text:p text:style-name="Horizontal_20_Line"/>
      <text:h text:style-name="P7" text:outline-level="2"><text:soft-page-break/>Garantiya ang Pagkabuhay-Muli</text:h>
      <text:p text:style-name="Text_20_body"><text:span text:style-name="Emphasis">(Strengthen confidence.)</text:span></text:p>
      <text:p text:style-name="Text_20_body">Sinasabi sa <text:span text:style-name="Strong_20_Emphasis">Gawa 17:31</text:span> na nagbigay si Jehova ng guarantee sa lahat sa pamamagitan ng pagbuhay-muli kay Jesus.</text:p>
      <text:p text:style-name="Text_20_body">A guarantee means proof.</text:p>
      <text:p text:style-name="Text_20_body">Hindi theory.<text:line-break/>Hindi imagination.</text:p>
      <text:p text:style-name="Text_20_body">Proof.</text:p>
      <text:p text:style-name="Text_20_body">So clearly — hindi puwedeng iyon ang wakas para kay Jesus.</text:p>
      <text:p text:style-name="Text_20_body">Ngayon…</text:p>
      <text:p text:style-name="Text_20_body">What does that mean for you? <text:span text:style-name="Emphasis">(Gentle pause.)</text:span></text:p>
      <text:p text:style-name="Horizontal_20_Line"/>
      <text:h text:style-name="Heading_20_1" text:outline-level="1">BAHAGI 2 — ANO ANG IBIG SABIHIN NITO PARA SA IYO?</text:h>
      <text:p text:style-name="Horizontal_20_Line"/>
      <text:h text:style-name="P7" text:outline-level="2">Nananabik si Jehova</text:h>
      <text:p text:style-name="Text_20_body"><text:span text:style-name="Emphasis">(Warm, slower.)</text:span></text:p>
      <text:p text:style-name="Text_20_body">Sa <text:span text:style-name="Strong_20_Emphasis">Job 14:14, 15</text:span>, sinasabi na si Jehova ay “mananabik” para sa gawa ng kaniyang mga kamay.</text:p>
      <text:p text:style-name="Text_20_body">Imagine that.</text:p>
      <text:p text:style-name="Text_20_body">Jehovah longs to see His faithful servants again.</text:p>
      <text:p text:style-name="Text_20_body">Hindi mechanical ang resurrection.</text:p>
      <text:p text:style-name="Text_20_body">Personal ito.</text:p>
      <text:p text:style-name="Horizontal_20_Line"/>
      <text:h text:style-name="P7" text:outline-level="2">Ipinakita ni Jesus ang Puso ni Jehova</text:h>
      <text:p text:style-name="Text_20_body"><text:span text:style-name="Emphasis">(Gentle, empathetic.)</text:span></text:p>
      <text:p text:style-name="Text_20_body">Nang mamatay si Lazaro, umiyak si Jesus. <text:span text:style-name="Emphasis">(Pause.)</text:span></text:p>
      <text:p text:style-name="Text_20_body">Hindi lang ito tungkol sa power.</text:p>
      <text:p text:style-name="Text_20_body">It’s about love.</text:p>
      <text:p text:style-name="Text_20_body">Kung ganoon ang naramdaman ni Jesus para sa isang pamilya…</text:p>
      <text:p text:style-name="Text_20_body">Isipin mo kung ano ang nararamdaman ni Jehova para sa milyon-milyon na natutulog sa kamatayan.</text:p>
      <text:p text:style-name="Horizontal_20_Line"/>
      <text:h text:style-name="P7" text:outline-level="2">Pangwakas</text:h>
      <text:p text:style-name="Text_20_body"><text:span text:style-name="Emphasis">(Stronger voice. Build steadily. Slow down at the final lines.)</text:span></text:p>
      <text:p text:style-name="Text_20_body"><text:soft-page-break/>Nagsimula tayo sa ideyang:</text:p>
      <text:p text:style-name="Text_20_body">“Kapag may namatay… wakas na.”</text:p>
      <text:p text:style-name="Text_20_body">Pero nakita natin — hindi iyon totoo.</text:p>
      <text:p text:style-name="Text_20_body">Walang claim ang kamatayan kay Jesus.</text:p>
      <text:p text:style-name="Text_20_body">Justice demanded his resurrection.</text:p>
      <text:p text:style-name="Text_20_body">Binayaran ng sakripisyo niya ang utang natin.</text:p>
      <text:p text:style-name="Text_20_body">At ang pagkabuhay-muli niya ang garantiya ng atin.</text:p>
      <text:p text:style-name="Text_20_body">Kaya kapag sinasabi ng mundo,<text:line-break/>“This is the end,” <text:span text:style-name="Emphasis">(Slow down.)</text:span></text:p>
      <text:p text:style-name="Text_20_body">Sasagot tayo nang may kumpiyansa:</text:p>
      <text:p text:style-name="Text_20_body">“No. This is not the end.”</text:p>
      <text:p text:style-name="Text_20_body">Dahil napatunayan na ni Jehova —</text:p>
      <text:p text:style-name="Text_20_body"><text:span text:style-name="Strong_20_Emphasis">Nothing, not even death, can stop His purpose.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23:37:43.946760969</meta:creation-date>
    <dc:date>2026-02-14T00:07:26.255524932</dc:date>
    <meta:editing-duration>PT29M41S</meta:editing-duration>
    <meta:editing-cycles>6</meta:editing-cycles>
    <meta:generator>LibreOffice/24.2.7.2$Linux_X86_64 LibreOffice_project/420$Build-2</meta:generator>
    <meta:print-date>2026-02-13T23:58:36.278934050</meta:print-date>
    <meta:printed-by>PDF files</meta:printed-by>
    <meta:document-statistic meta:table-count="0" meta:image-count="0" meta:object-count="0" meta:page-count="4" meta:paragraph-count="96" meta:word-count="625" meta:character-count="3921" meta:non-whitespace-character-count="3381"/>
  </office:meta>
</office:document-meta>
</file>