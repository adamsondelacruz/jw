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5pt" fo:background-color="#b2b2b2" style:font-size-asian="15pt" style:font-size-complex="15pt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2">
      <style:text-properties fo:font-size="14pt" fo:background-color="#dee6ef" style:font-size-asian="18pt" style:font-size-complex="18pt"/>
    </style:style>
    <style:style style:name="P4" style:family="paragraph" style:parent-style-name="Heading_20_2">
      <style:paragraph-properties fo:keep-with-next="always"/>
      <style:text-properties fo:font-size="14pt" fo:background-color="#dee6ef"/>
    </style:style>
    <style:style style:name="P5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 1 — WHY JESUS’ DEATH WAS NOT THE END</text:h>
      <text:p text:style-name="Horizontal_20_Line"/>
      <text:p text:style-name="Text_20_body"><text:span text:style-name="Emphasis">(Gentle, reflective, unhurried.)</text:span></text:p>
      <text:p text:style-name="Text_20_body">When someone we love dies…<text:line-break/>it can feel like a door has closed forever.</text:p>
      <text:p text:style-name="Text_20_body">The silence feels permanent.<text:line-break/>The separation feels final.</text:p>
      <text:p text:style-name="Text_20_body">Many people say, “That’s the end.”</text:p>
      <text:p text:style-name="Text_20_body">But is it? <text:span text:style-name="Emphasis">(Pause briefly.)</text:span></text:p>
      <text:p text:style-name="Text_20_body">Let’s begin with a simple truth from <text:span text:style-name="Strong_20_Emphasis">Romans 6:23</text:span>:</text:p>
      <text:p text:style-name="Quotations">“The wages sin pays is death.”</text:p>
      <text:p text:style-name="Text_20_body">Notice the word <text:span text:style-name="Emphasis">wages.</text:span> <text:span text:style-name="Emphasis">(Slight emphasis.)</text:span></text:p>
      <text:p text:style-name="Text_20_body">Wages are something earned — a payment.</text:p>
      <text:p text:style-name="Text_20_body">Death exists because sin exists.<text:line-break/>It is the judicial penalty for sin.</text:p>
      <text:p text:style-name="Text_20_body">Adam sinned — and the sentence was death.<text:line-break/>All of us inherited that condition.</text:p>
      <text:p text:style-name="Text_20_body">Now let’s reason carefully:</text:p>
      <text:p text:style-name="Text_20_body">If death is the penalty for sin…<text:line-break/>what about someone who never sinned? <text:span text:style-name="Emphasis">(Brief pause.)</text:span></text:p>
      <text:p text:style-name="Text_20_body">Would death have a legal claim on that person?</text:p>
      <text:p text:style-name="Horizontal_20_Line"/>
      <text:h text:style-name="P3" text:outline-level="2">Jesus Committed No Sin</text:h>
      <text:p text:style-name="Text_20_body"><text:span text:style-name="Emphasis">(Structured, confident, logical — steady pace.)</text:span></text:p>
      <text:p text:style-name="Text_20_body">Jesus lived a perfect life.</text:p>
      <text:p text:style-name="Text_20_body">He never violated Jehovah’s standards.</text:p>
      <text:p text:style-name="Text_20_body">So legally speaking, he did not deserve death.</text:p>
      <text:p text:style-name="Text_20_body">Turn to <text:span text:style-name="Strong_20_Emphasis">John 10:18</text:span>.</text:p>
      <text:p text:style-name="Quotations">“No one has taken it away from me, but I surrender it of my own initiative.”</text:p>
      <text:p text:style-name="Text_20_body">His death was voluntary.</text:p>
      <text:p text:style-name="Text_20_body">Now notice <text:span text:style-name="Strong_20_Emphasis">Acts 2:24</text:span>:</text:p>
      <text:p text:style-name="Quotations">It was not possible for him to be held fast by death.</text:p>
      <text:p text:style-name="Text_20_body">Why was it “not possible”? <text:span text:style-name="Emphasis">(Pause slightly.)</text:span></text:p>
      <text:p text:style-name="Text_20_body">Because Jehovah is just.</text:p>
      <text:p text:style-name="Text_20_body"><text:soft-page-break/>Justice does not allow punishment to continue when no guilt exists.</text:p>
      <text:p text:style-name="Text_20_body">Death had no rightful claim on a sinless man.</text:p>
      <text:p text:style-name="Text_20_body">So Jehovah raised him. <text:span text:style-name="Emphasis">(Measured pause.)</text:span></text:p>
      <text:p text:style-name="Text_20_body">Resurrection was not merely mercy —<text:line-break/>it was justice.</text:p>
      <text:p text:style-name="Horizontal_20_Line"/>
      <text:h text:style-name="P4" text:outline-level="2">The Legal Right to Continue Living</text:h>
      <text:p text:style-name="Text_20_body"><text:span text:style-name="Emphasis">(Clear, progressive reasoning. Deliberate pace.)</text:span></text:p>
      <text:p text:style-name="Text_20_body">As a perfect human, Jesus had the legal right to live forever.</text:p>
      <text:p text:style-name="Text_20_body">Adam lost that right.</text:p>
      <text:p text:style-name="Text_20_body">Jesus maintained it.</text:p>
      <text:p text:style-name="Text_20_body">But instead of keeping that right for himself, he surrendered it.</text:p>
      <text:p text:style-name="Text_20_body">Why? <text:span text:style-name="Emphasis">(Brief pause.)</text:span></text:p>
      <text:p text:style-name="Text_20_body">To pay a debt.</text:p>
      <text:p text:style-name="Text_20_body">Adam forfeited perfect human life.<text:line-break/>The ransom required another perfect human life.</text:p>
      <text:p text:style-name="Text_20_body">That is why <text:span text:style-name="Strong_20_Emphasis">1 Peter 3:18</text:span> says he was put to death in the flesh but made alive in the spirit.</text:p>
      <text:p text:style-name="Text_20_body">After his resurrection, he presented to Jehovah the value of his perfect human life.</text:p>
      <text:p text:style-name="Text_20_body">One perfect life lost → one perfect life given.</text:p>
      <text:p text:style-name="Text_20_body">Justice satisfied. <text:span text:style-name="Emphasis">(Short pause.)</text:span></text:p>
      <text:p text:style-name="Horizontal_20_Line"/>
      <text:h text:style-name="P4" text:outline-level="2">Illustration — Paid in Full</text:h>
      <text:p text:style-name="Text_20_body"><text:span text:style-name="Emphasis">(Calm, explanatory, grounded.)</text:span></text:p>
      <text:p text:style-name="Text_20_body">Adam’s sin created a debt — the loss of perfect human life.</text:p>
      <text:p text:style-name="Text_20_body">All of us inherited that debt.<text:line-break/>And no imperfect human could repay it.</text:p>
      <text:p text:style-name="Text_20_body">Imagine someone owes a massive financial debt — far beyond their ability to pay.</text:p>
      <text:p text:style-name="Text_20_body">Then another person, who is not responsible for that debt, steps in and pays the full amount.</text:p>
      <text:p text:style-name="Text_20_body">When the payment is accepted, the account is marked:</text:p>
      <text:p text:style-name="Text_20_body"><text:span text:style-name="Strong_20_Emphasis">Paid in Full.</text:span> <text:span text:style-name="Emphasis">(Let this land.)</text:span></text:p>
      <text:p text:style-name="Text_20_body">The law is satisfied.<text:line-break/>The debt no longer stands against the person.</text:p>
      <text:p text:style-name="Text_20_body">That is what Jesus did.</text:p>
      <text:p text:style-name="Text_20_body">He did not owe death.</text:p>
      <text:p text:style-name="Text_20_body">But he surrendered his perfect human life.</text:p>
      <text:p text:style-name="Text_20_body"><text:soft-page-break/>After his resurrection, he presented its value to Jehovah.</text:p>
      <text:p text:style-name="Text_20_body">Jehovah accepted it.</text:p>
      <text:p text:style-name="Text_20_body">Justice was satisfied. <text:span text:style-name="Emphasis">(Short pause.)</text:span></text:p>
      <text:p text:style-name="Text_20_body">Which is why death could not hold Jesus permanently — and why there is now a legal basis for removing inherited sin.</text:p>
      <text:p text:style-name="Horizontal_20_Line"/>
      <text:h text:style-name="P4" text:outline-level="2">The Resurrection — A Guarantee</text:h>
      <text:p text:style-name="Text_20_body"><text:span text:style-name="Emphasis">(Strengthen confidence. Slight lift.)</text:span></text:p>
      <text:p text:style-name="Text_20_body">Turn to <text:span text:style-name="Strong_20_Emphasis">Acts 17:31</text:span>.</text:p>
      <text:p text:style-name="Text_20_body">Jehovah furnished a guarantee to all men by resurrecting Jesus.</text:p>
      <text:p text:style-name="Text_20_body">A guarantee is proof.</text:p>
      <text:p text:style-name="Text_20_body">It proves that:</text:p>
      <text:list text:style-name="L1">
        <text:list-item>
          <text:p text:style-name="P5">Death is not final.</text:p>
        </text:list-item>
        <text:list-item>
          <text:p text:style-name="P5">Judgment is certain.</text:p>
        </text:list-item>
        <text:list-item>
          <text:p text:style-name="P5">Restoration is possible.</text:p>
        </text:list-item>
      </text:list>
      <text:p text:style-name="Text_20_body">So logically — Jesus’ death could not be the end.</text:p>
      <text:p text:style-name="Text_20_body">Now…</text:p>
      <text:p text:style-name="Text_20_body">What does that mean for you? <text:span text:style-name="Emphasis">(Gentle transition pause.)</text:span></text:p>
      <text:p text:style-name="Horizontal_20_Line"/>
      <text:h text:style-name="P2" text:outline-level="1">PART 2 — WHAT WILL “THE END” MEAN FOR YOU?</text:h>
      <text:p text:style-name="Horizontal_20_Line"/>
      <text:h text:style-name="P4" text:outline-level="2">Jehovah Longs to Bring His Servants Back</text:h>
      <text:p text:style-name="Text_20_body"><text:span text:style-name="Emphasis">(Warm, slower. Allow feeling.)</text:span></text:p>
      <text:p text:style-name="Text_20_body">Consider <text:span text:style-name="Strong_20_Emphasis">Job 14:14, 15</text:span>.</text:p>
      <text:p text:style-name="Text_20_body">Job expressed confidence that Jehovah would call him from the grave.</text:p>
      <text:p text:style-name="Text_20_body">The verse says Jehovah would “long” for the work of His hands.</text:p>
      <text:p text:style-name="Text_20_body">Jehovah longs <text:span text:style-name="Emphasis">(slight pause)</text:span> to see His faithful servants again.</text:p>
      <text:p text:style-name="Text_20_body">Resurrection is not mechanical.</text:p>
      <text:p text:style-name="Text_20_body">It is deeply personal.</text:p>
      <text:p text:style-name="Horizontal_20_Line"/>
      <text:h text:style-name="Heading_20_2" text:outline-level="2">Jesus Revealed Jehovah’s Heart</text:h>
      <text:p text:style-name="Text_20_body"><text:span text:style-name="Emphasis">(Gentle, empathetic.)</text:span></text:p>
      <text:p text:style-name="Text_20_body">When Jesus stood outside Lazarus’ tomb, he was deeply moved.</text:p>
      <text:p text:style-name="Text_20_body"><text:soft-page-break/>He wept. <text:span text:style-name="Emphasis">(Pause.)</text:span></text:p>
      <text:p text:style-name="Text_20_body">Resurrection is not just about power.</text:p>
      <text:p text:style-name="Text_20_body">It is about love.</text:p>
      <text:p text:style-name="Text_20_body">If Jesus felt that way for one grieving family…</text:p>
      <text:p text:style-name="Text_20_body">Imagine how Jehovah feels toward millions who sleep in death.</text:p>
      <text:p text:style-name="Horizontal_20_Line"/>
      <text:h text:style-name="P4" text:outline-level="2">Final Appeal</text:h>
      <text:p text:style-name="Text_20_body"><text:span text:style-name="Emphasis">(Stronger voice. Build steadily. Slow down from “So when the world says…” onward.)</text:span></text:p>
      <text:p text:style-name="Text_20_body">We began with a painful thought:</text:p>
      <text:p text:style-name="Text_20_body">“When someone dies… that’s the end.”</text:p>
      <text:p text:style-name="Text_20_body">But we have seen tonight — that is not true.</text:p>
      <text:p text:style-name="Text_20_body">Death had no claim on Jesus.</text:p>
      <text:p text:style-name="Text_20_body">Justice demanded his resurrection.</text:p>
      <text:p text:style-name="Text_20_body">His sacrifice paid our debt.</text:p>
      <text:p text:style-name="Text_20_body">His resurrection guarantees ours.</text:p>
      <text:p text:style-name="Text_20_body">So when the world says, “This is the end,” <text:span text:style-name="Emphasis">(Slow down.)</text:span></text:p>
      <text:p text:style-name="Text_20_body">We answer with confidence:</text:p>
      <text:p text:style-name="Text_20_body">“No. This is not the end.”</text:p>
      <text:p text:style-name="Text_20_body">Because Jehovah has already proven —</text:p>
      <text:p text:style-name="Text_20_body"><text:span text:style-name="Strong_20_Emphasis">Nothing, not even death, can stop His purpose.</text:span></text:p>
      <text:p text:style-name="Text_20_body"><text:span text:style-name="Emphasis">(Full pause. Hold eye contact. Count silently: one… two… three.)</text:span></text:p>
      <text:p text:style-name="Text_20_body">Step away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3:37:43.946760969</meta:creation-date>
    <dc:date>2026-02-13T23:46:55.837001903</dc:date>
    <meta:editing-duration>PT9M1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105" meta:word-count="763" meta:character-count="4433" meta:non-whitespace-character-count="3764"/>
  </office:meta>
</office:document-meta>
</file>