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2000000823BEA4DB2.png" manifest:media-type="image/png"/>
  <manifest:file-entry manifest:full-path="Pictures/10000001000008B6000000290987DF02.png" manifest:media-type="image/png"/>
  <manifest:file-entry manifest:full-path="Pictures/10000001000001480000007D5FCFDDB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UnicodeMS" svg:font-family="ArialUnicodeM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5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font-name="ArialUnicodeMS" fo:font-size="24pt" fo:font-weight="normal" style:font-name-asian="ArialUnicodeMS" style:font-size-asian="24pt" style:font-weight-asian="normal" style:font-name-complex="ArialUnicodeMS" style:font-size-complex="24pt" style:font-weight-complex="normal"/>
    </style:style>
    <style:style style:name="T2" style:family="text">
      <style:text-properties fo:color="#000000" loext:opacity="100%" style:font-name="ArialUnicodeMS" fo:font-size="9pt" fo:font-weight="normal" style:font-name-asian="ArialUnicodeMS" style:font-size-asian="9pt" style:font-weight-asian="normal" style:font-name-complex="ArialUnicodeMS" style:font-size-complex="9pt" style:font-weight-complex="normal"/>
    </style:style>
    <style:style style:name="T3" style:family="text">
      <style:text-properties fo:color="#000000" loext:opacity="100%" style:font-name="ArialUnicodeMS" fo:font-size="9pt" fo:font-weight="bold" style:font-name-asian="ArialUnicodeMS" style:font-size-asian="9pt" style:font-weight-asian="bold" style:font-name-complex="ArialUnicodeMS" style:font-size-complex="9pt" style:font-weight-complex="bold"/>
    </style:style>
    <style:style style:name="T4" style:family="text">
      <style:text-properties fo:color="#333333" loext:opacity="100%" style:font-name="ArialUnicodeMS" fo:font-size="8pt" fo:font-weight="normal" style:font-name-asian="ArialUnicodeMS" style:font-size-asian="8pt" style:font-weight-asian="normal" style:font-name-complex="ArialUnicodeMS" style:font-size-complex="8pt" style:font-weight-complex="normal"/>
    </style:style>
    <style:style style:name="T5" style:family="text">
      <style:text-properties fo:color="#000000" loext:opacity="100%" style:font-name="ArialUnicodeMS" fo:font-size="10.8000001907349pt" fo:font-weight="bold" style:font-name-asian="ArialUnicodeMS" style:font-size-asian="10.8000001907349pt" style:font-weight-asian="bold" style:font-name-complex="ArialUnicodeMS" style:font-size-complex="10.800000190734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771cm" svg:height="2.199cm" svg:x="14.226cm" svg:y="1.328cm">
          <draw:image xlink:href="Pictures/10000001000001480000007D5FCFDDBC.png" xlink:type="simple" xlink:show="embed" xlink:actuate="onLoad" draw:mime-type="image/png">
            <text:p/>
          </draw:image>
        </draw:frame>
        <draw:frame draw:style-name="gr2" draw:text-style-name="P3" draw:layer="layout" svg:width="5.12cm" svg:height="1.157cm" svg:x="1cm" svg:y="3.947cm">
          <draw:text-box>
            <text:p text:style-name="P2"><text:span text:style-name="T1">TAX </text:span><text:span text:style-name="T1">INV</text:span><text:span text:style-name="T1">OIC</text:span><text:span text:style-name="T1">E</text:span></text:p>
          </draw:text-box>
        </draw:frame>
        <draw:frame draw:style-name="gr3" draw:text-style-name="P4" draw:layer="layout" svg:width="7.139cm" svg:height="0.433cm" svg:x="2cm" svg:y="5.288cm">
          <draw:text-box>
            <text:p text:style-name="P2"><text:span text:style-name="T2">Ashburto</text:span><text:span text:style-name="T2">n </text:span><text:span text:style-name="T2">Kingdom </text:span><text:span text:style-name="T2">Hall of </text:span><text:span text:style-name="T2">Jehovah's </text:span><text:span text:style-name="T2">Witnesses</text:span></text:p>
          </draw:text-box>
        </draw:frame>
        <draw:frame draw:style-name="gr3" draw:text-style-name="P4" draw:layer="layout" svg:width="2.978cm" svg:height="0.433cm" svg:x="2cm" svg:y="5.747cm">
          <draw:text-box>
            <text:p text:style-name="P2"><text:span text:style-name="T2">264 </text:span><text:span text:style-name="T2">Cameron </text:span><text:span text:style-name="T2">Street</text:span></text:p>
          </draw:text-box>
        </draw:frame>
        <draw:frame draw:style-name="gr3" draw:text-style-name="P4" draw:layer="layout" svg:width="2.385cm" svg:height="0.433cm" svg:x="2cm" svg:y="6.206cm">
          <draw:text-box>
            <text:p text:style-name="P2"><text:span text:style-name="T2">Ashburto</text:span><text:span text:style-name="T2">n 7700</text:span></text:p>
          </draw:text-box>
        </draw:frame>
        <draw:frame draw:style-name="gr3" draw:text-style-name="P4" draw:layer="layout" svg:width="1.992cm" svg:height="0.433cm" svg:x="12.399cm" svg:y="3.984cm">
          <draw:text-box>
            <text:p text:style-name="P2"><text:span text:style-name="T3">Invoice </text:span><text:span text:style-name="T3">Date</text:span></text:p>
          </draw:text-box>
        </draw:frame>
        <draw:frame draw:style-name="gr3" draw:text-style-name="P4" draw:layer="layout" svg:width="1.793cm" svg:height="0.433cm" svg:x="12.399cm" svg:y="4.365cm">
          <draw:text-box>
            <text:p text:style-name="P2"><text:span text:style-name="T2">20 Feb </text:span><text:span text:style-name="T2">2025</text:span></text:p>
          </draw:text-box>
        </draw:frame>
        <draw:frame draw:style-name="gr3" draw:text-style-name="P4" draw:layer="layout" svg:width="2.55cm" svg:height="0.433cm" svg:x="12.399cm" svg:y="4.996cm">
          <draw:text-box>
            <text:p text:style-name="P2"><text:span text:style-name="T3">Invoice </text:span><text:span text:style-name="T3">Number</text:span></text:p>
          </draw:text-box>
        </draw:frame>
        <draw:frame draw:style-name="gr3" draw:text-style-name="P4" draw:layer="layout" svg:width="1.729cm" svg:height="0.433cm" svg:x="12.399cm" svg:y="5.377cm">
          <draw:text-box>
            <text:p text:style-name="P2"><text:span text:style-name="T2">INV-</text:span><text:span text:style-name="T2">000719</text:span></text:p>
          </draw:text-box>
        </draw:frame>
        <draw:frame draw:style-name="gr3" draw:text-style-name="P4" draw:layer="layout" svg:width="1.983cm" svg:height="0.433cm" svg:x="12.399cm" svg:y="6.008cm">
          <draw:text-box>
            <text:p text:style-name="P2"><text:span text:style-name="T3">GST </text:span><text:span text:style-name="T3">Number</text:span></text:p>
          </draw:text-box>
        </draw:frame>
        <draw:frame draw:style-name="gr3" draw:text-style-name="P4" draw:layer="layout" svg:width="1.839cm" svg:height="0.433cm" svg:x="12.399cm" svg:y="6.389cm">
          <draw:text-box>
            <text:p text:style-name="P2"><text:span text:style-name="T2">077-379-</text:span><text:span text:style-name="T2">177</text:span></text:p>
          </draw:text-box>
        </draw:frame>
        <draw:frame draw:style-name="gr3" draw:text-style-name="P4" draw:layer="layout" svg:width="2.915cm" svg:height="0.433cm" svg:x="16.199cm" svg:y="4.022cm">
          <draw:text-box>
            <text:p text:style-name="P2"><text:span text:style-name="T2">Active </text:span><text:span text:style-name="T2">Maintena</text:span><text:span text:style-name="T2">nce</text:span></text:p>
          </draw:text-box>
        </draw:frame>
        <draw:frame draw:style-name="gr3" draw:text-style-name="P4" draw:layer="layout" svg:width="3.139cm" svg:height="0.433cm" svg:x="16.199cm" svg:y="4.481cm">
          <draw:text-box>
            <text:p text:style-name="P2"><text:span text:style-name="T2">21 </text:span><text:span text:style-name="T2">Waymout</text:span><text:span text:style-name="T2">h Street,</text:span></text:p>
          </draw:text-box>
        </draw:frame>
        <draw:frame draw:style-name="gr3" draw:text-style-name="P4" draw:layer="layout" svg:width="3.698cm" svg:height="0.433cm" svg:x="16.199cm" svg:y="4.94cm">
          <draw:text-box>
            <text:p text:style-name="P2"><text:span text:style-name="T2">Fairton, </text:span><text:span text:style-name="T2">Ashburto</text:span><text:span text:style-name="T2">n, 7700</text:span></text:p>
          </draw:text-box>
        </draw:frame>
        <draw:frame draw:style-name="gr3" draw:text-style-name="P4" draw:layer="layout" svg:width="2.169cm" svg:height="0.433cm" svg:x="16.199cm" svg:y="5.398cm">
          <draw:text-box>
            <text:p text:style-name="P2"><text:span text:style-name="T2">M 021 483 </text:span><text:span text:style-name="T2">376</text:span></text:p>
          </draw:text-box>
        </draw:frame>
        <draw:frame draw:style-name="gr3" draw:text-style-name="P4" draw:layer="layout" svg:width="3.677cm" svg:height="0.433cm" svg:x="16.199cm" svg:y="5.857cm">
          <draw:text-box>
            <text:p text:style-name="P2"><text:span text:style-name="T2">E </text:span><text:span text:style-name="T2">steven@a</text:span><text:span text:style-name="T2">ctive.mbol</text:span><text:span text:style-name="T2">.nz</text:span></text:p>
          </draw:text-box>
        </draw:frame>
        <draw:frame draw:style-name="gr3" draw:text-style-name="P4" draw:layer="layout" svg:width="2.525cm" svg:height="0.433cm" svg:x="16.199cm" svg:y="6.316cm">
          <draw:text-box>
            <text:p text:style-name="P2"><text:span text:style-name="T2">W </text:span><text:span text:style-name="T2">active.mb</text:span><text:span text:style-name="T2">ol.nz</text:span></text:p>
          </draw:text-box>
        </draw:frame>
        <draw:frame draw:style-name="gr3" draw:text-style-name="P4" draw:layer="layout" svg:width="1.827cm" svg:height="0.433cm" svg:x="1.1cm" svg:y="10.183cm">
          <draw:text-box>
            <text:p text:style-name="P2"><text:span text:style-name="T3">Descripti</text:span><text:span text:style-name="T3">on</text:span></text:p>
          </draw:text-box>
        </draw:frame>
        <draw:frame draw:style-name="gr3" draw:text-style-name="P4" draw:layer="layout" svg:width="1.416cm" svg:height="0.433cm" svg:x="13.017cm" svg:y="10.183cm">
          <draw:text-box>
            <text:p text:style-name="P2"><text:span text:style-name="T3">Quantity</text:span></text:p>
          </draw:text-box>
        </draw:frame>
        <draw:frame draw:style-name="gr3" draw:text-style-name="P4" draw:layer="layout" svg:width="1.556cm" svg:height="0.433cm" svg:x="15.673cm" svg:y="10.183cm">
          <draw:text-box>
            <text:p text:style-name="P2"><text:span text:style-name="T3">Unit Price</text:span></text:p>
          </draw:text-box>
        </draw:frame>
        <draw:frame draw:style-name="gr3" draw:text-style-name="P4" draw:layer="layout" svg:width="2.042cm" svg:height="0.433cm" svg:x="18.064cm" svg:y="10.183cm">
          <draw:text-box>
            <text:p text:style-name="P2"><text:span text:style-name="T3">Amount </text:span><text:span text:style-name="T3">NZD</text:span></text:p>
          </draw:text-box>
        </draw:frame>
        <draw:frame draw:style-name="gr3" draw:text-style-name="P4" draw:layer="layout" svg:width="10.844cm" svg:height="0.433cm" svg:x="1.1cm" svg:y="10.991cm">
          <draw:text-box>
            <text:p text:style-name="P2"><text:span text:style-name="T2">Heat </text:span><text:span text:style-name="T2">pump </text:span><text:span text:style-name="T2">maintena</text:span><text:span text:style-name="T2">nce to </text:span><text:span text:style-name="T2">Toshiba </text:span><text:span text:style-name="T2">Ceiling </text:span><text:span text:style-name="T2">Cassette </text:span><text:span text:style-name="T2">in Main </text:span><text:span text:style-name="T2">Auditoriu</text:span><text:span text:style-name="T2">m.</text:span></text:p>
          </draw:text-box>
        </draw:frame>
        <draw:frame draw:style-name="gr3" draw:text-style-name="P4" draw:layer="layout" svg:width="10.615cm" svg:height="0.433cm" svg:x="1.1cm" svg:y="11.753cm">
          <draw:text-box>
            <text:p text:style-name="P2"><text:span text:style-name="T2">20/02/15 - </text:span><text:span text:style-name="T2">Carried </text:span><text:span text:style-name="T2">out 30 </text:span><text:span text:style-name="T2">point </text:span><text:span text:style-name="T2">check, </text:span><text:span text:style-name="T2">found </text:span><text:span text:style-name="T2">noisy </text:span><text:span text:style-name="T2">vibration, </text:span><text:span text:style-name="T2">filter </text:span><text:span text:style-name="T2">badly</text:span></text:p>
          </draw:text-box>
        </draw:frame>
        <draw:frame draw:style-name="gr3" draw:text-style-name="P4" draw:layer="layout" svg:width="11.038cm" svg:height="0.433cm" svg:x="1.1cm" svg:y="12.134cm">
          <draw:text-box>
            <text:p text:style-name="P2"><text:span text:style-name="T2">blocked, </text:span><text:span text:style-name="T2">and </text:span><text:span text:style-name="T2">indoor </text:span><text:span text:style-name="T2">unit coil </text:span><text:span text:style-name="T2">very dirty. </text:span><text:span text:style-name="T2">Outdoor </text:span><text:span text:style-name="T2">unit had </text:span><text:span text:style-name="T2">debris </text:span><text:span text:style-name="T2">inside the</text:span></text:p>
          </draw:text-box>
        </draw:frame>
        <draw:frame draw:style-name="gr3" draw:text-style-name="P4" draw:layer="layout" svg:width="11.474cm" svg:height="0.433cm" svg:x="1.1cm" svg:y="12.515cm">
          <draw:text-box>
            <text:p text:style-name="P2"><text:span text:style-name="T2">unit </text:span><text:span text:style-name="T2">partially </text:span><text:span text:style-name="T2">blocking </text:span><text:span text:style-name="T2">the drain </text:span><text:span text:style-name="T2">channel. </text:span><text:span text:style-name="T2">Removed </text:span><text:span text:style-name="T2">cover and </text:span><text:span text:style-name="T2">filter, </text:span><text:span text:style-name="T2">scrubbed,</text:span></text:p>
          </draw:text-box>
        </draw:frame>
        <draw:frame draw:style-name="gr3" draw:text-style-name="P4" draw:layer="layout" svg:width="11.229cm" svg:height="0.433cm" svg:x="1.1cm" svg:y="12.896cm">
          <draw:text-box>
            <text:p text:style-name="P2"><text:span text:style-name="T2">washed </text:span><text:span text:style-name="T2">and left to </text:span><text:span text:style-name="T2">dry. </text:span><text:span text:style-name="T2">Removed </text:span><text:span text:style-name="T2">top cover </text:span><text:span text:style-name="T2">from </text:span><text:span text:style-name="T2">outdoor </text:span><text:span text:style-name="T2">unit and </text:span><text:span text:style-name="T2">removed</text:span></text:p>
          </draw:text-box>
        </draw:frame>
        <draw:frame draw:style-name="gr3" draw:text-style-name="P4" draw:layer="layout" svg:width="11.343cm" svg:height="0.433cm" svg:x="1.1cm" svg:y="13.277cm">
          <draw:text-box>
            <text:p text:style-name="P2"><text:span text:style-name="T2">debris </text:span><text:span text:style-name="T2">from </text:span><text:span text:style-name="T2">inside </text:span><text:span text:style-name="T2">outdoor </text:span><text:span text:style-name="T2">unit </text:span><text:span text:style-name="T2">around </text:span><text:span text:style-name="T2">and under </text:span><text:span text:style-name="T2">outdoor </text:span><text:span text:style-name="T2">unit. </text:span><text:span text:style-name="T2">Applied </text:span><text:span text:style-name="T2">coil</text:span></text:p>
          </draw:text-box>
        </draw:frame>
        <draw:frame draw:style-name="gr3" draw:text-style-name="P4" draw:layer="layout" svg:width="10.75cm" svg:height="0.433cm" svg:x="1.1cm" svg:y="13.658cm">
          <draw:text-box>
            <text:p text:style-name="P2"><text:span text:style-name="T2">cleaner </text:span><text:span text:style-name="T2">and </text:span><text:span text:style-name="T2">washed </text:span><text:span text:style-name="T2">coil and </text:span><text:span text:style-name="T2">fan blade </text:span><text:span text:style-name="T2">and fan </text:span><text:span text:style-name="T2">blade </text:span><text:span text:style-name="T2">cover. </text:span><text:span text:style-name="T2">Washed </text:span><text:span text:style-name="T2">and</text:span></text:p>
          </draw:text-box>
        </draw:frame>
        <draw:frame draw:style-name="gr3" draw:text-style-name="P4" draw:layer="layout" svg:width="11.174cm" svg:height="0.433cm" svg:x="1.1cm" svg:y="14.039cm">
          <draw:text-box>
            <text:p text:style-name="P2"><text:span text:style-name="T2">flushed </text:span><text:span text:style-name="T2">out drain </text:span><text:span text:style-name="T2">and </text:span><text:span text:style-name="T2">channel </text:span><text:span text:style-name="T2">and made </text:span><text:span text:style-name="T2">sure </text:span><text:span text:style-name="T2">flowing </text:span><text:span text:style-name="T2">clear. </text:span><text:span text:style-name="T2">Fitted </text:span><text:span text:style-name="T2">back top</text:span></text:p>
          </draw:text-box>
        </draw:frame>
        <draw:frame draw:style-name="gr3" draw:text-style-name="P4" draw:layer="layout" svg:width="10.59cm" svg:height="0.433cm" svg:x="1.1cm" svg:y="14.42cm">
          <draw:text-box>
            <text:p text:style-name="P2"><text:span text:style-name="T2">cover and </text:span><text:span text:style-name="T2">secured. </text:span><text:span text:style-name="T2">Removed </text:span><text:span text:style-name="T2">fan </text:span><text:span text:style-name="T2">cowling, </text:span><text:span text:style-name="T2">removed </text:span><text:span text:style-name="T2">controller </text:span><text:span text:style-name="T2">box from</text:span></text:p>
          </draw:text-box>
        </draw:frame>
        <draw:frame draw:style-name="gr3" draw:text-style-name="P4" draw:layer="layout" svg:width="10.065cm" svg:height="0.433cm" svg:x="1.1cm" svg:y="14.801cm">
          <draw:text-box>
            <text:p text:style-name="P2"><text:span text:style-name="T2">position. </text:span><text:span text:style-name="T2">Applied </text:span><text:span text:style-name="T2">coil </text:span><text:span text:style-name="T2">cleaner, </text:span><text:span text:style-name="T2">washed </text:span><text:span text:style-name="T2">indoor </text:span><text:span text:style-name="T2">coil, and </text:span><text:span text:style-name="T2">scrubbed </text:span><text:span text:style-name="T2">coil</text:span></text:p>
          </draw:text-box>
        </draw:frame>
        <draw:frame draw:style-name="gr3" draw:text-style-name="P4" draw:layer="layout" svg:width="10.928cm" svg:height="0.433cm" svg:x="1.1cm" svg:y="15.182cm">
          <draw:text-box>
            <text:p text:style-name="P2"><text:span text:style-name="T2">thoroughl</text:span><text:span text:style-name="T2">y. Forced </text:span><text:span text:style-name="T2">water into </text:span><text:span text:style-name="T2">drain and </text:span><text:span text:style-name="T2">flushed </text:span><text:span text:style-name="T2">out drain </text:span><text:span text:style-name="T2">and made </text:span><text:span text:style-name="T2">sure</text:span></text:p>
          </draw:text-box>
        </draw:frame>
        <draw:frame draw:style-name="gr3" draw:text-style-name="P4" draw:layer="layout" svg:width="10.475cm" svg:height="0.433cm" svg:x="1.1cm" svg:y="15.563cm">
          <draw:text-box>
            <text:p text:style-name="P2"><text:span text:style-name="T2">flowing </text:span><text:span text:style-name="T2">clear, </text:span><text:span text:style-name="T2">applied </text:span><text:span text:style-name="T2">coil </text:span><text:span text:style-name="T2">deodorize</text:span><text:span text:style-name="T2">r to coil.. </text:span><text:span text:style-name="T2">Fitted </text:span><text:span text:style-name="T2">back all </text:span><text:span text:style-name="T2">covers </text:span><text:span text:style-name="T2">and</text:span></text:p>
          </draw:text-box>
        </draw:frame>
        <draw:frame draw:style-name="gr3" draw:text-style-name="P4" draw:layer="layout" svg:width="10.149cm" svg:height="0.433cm" svg:x="1.1cm" svg:y="15.944cm">
          <draw:text-box>
            <text:p text:style-name="P2"><text:span text:style-name="T2">secured. </text:span><text:span text:style-name="T2">Checked </text:span><text:span text:style-name="T2">operation </text:span><text:span text:style-name="T2">heating </text:span><text:span text:style-name="T2">55 </text:span><text:span text:style-name="T2">degrees / </text:span><text:span text:style-name="T2">cooling 7 </text:span><text:span text:style-name="T2">degrees.</text:span></text:p>
          </draw:text-box>
        </draw:frame>
        <draw:frame draw:style-name="gr3" draw:text-style-name="P4" draw:layer="layout" svg:width="2.021cm" svg:height="0.433cm" svg:x="1.1cm" svg:y="16.325cm">
          <draw:text-box>
            <text:p text:style-name="P2"><text:span text:style-name="T2">Working </text:span><text:span text:style-name="T2">well.</text:span></text:p>
          </draw:text-box>
        </draw:frame>
        <draw:frame draw:style-name="gr3" draw:text-style-name="P4" draw:layer="layout" svg:width="8.477cm" svg:height="0.433cm" svg:x="1.1cm" svg:y="17.087cm">
          <draw:text-box>
            <text:p text:style-name="P2"><text:span text:style-name="T2">* I would </text:span><text:span text:style-name="T2">recomme</text:span><text:span text:style-name="T2">nd filter </text:span><text:span text:style-name="T2">be </text:span><text:span text:style-name="T2">cleaned </text:span><text:span text:style-name="T2">every 3 </text:span><text:span text:style-name="T2">months *i</text:span></text:p>
          </draw:text-box>
        </draw:frame>
        <draw:frame draw:style-name="gr3" draw:text-style-name="P4" draw:layer="layout" svg:width="0.629cm" svg:height="0.433cm" svg:x="13.581cm" svg:y="10.991cm">
          <draw:text-box>
            <text:p text:style-name="P2"><text:span text:style-name="T2">1.00</text:span></text:p>
          </draw:text-box>
        </draw:frame>
        <draw:frame draw:style-name="gr3" draw:text-style-name="P4" draw:layer="layout" svg:width="0.993cm" svg:height="0.433cm" svg:x="16.078cm" svg:y="10.991cm">
          <draw:text-box>
            <text:p text:style-name="P2"><text:span text:style-name="T2">130.00</text:span></text:p>
          </draw:text-box>
        </draw:frame>
        <draw:frame draw:style-name="gr3" draw:text-style-name="P4" draw:layer="layout" svg:width="0.993cm" svg:height="0.433cm" svg:x="18.928cm" svg:y="10.991cm">
          <draw:text-box>
            <text:p text:style-name="P2"><text:span text:style-name="T2">130.00</text:span></text:p>
          </draw:text-box>
        </draw:frame>
        <draw:frame draw:style-name="gr3" draw:text-style-name="P4" draw:layer="layout" svg:width="11.385cm" svg:height="0.433cm" svg:x="1.1cm" svg:y="17.894cm">
          <draw:text-box>
            <text:p text:style-name="P2"><text:span text:style-name="T2">Heat </text:span><text:span text:style-name="T2">pump </text:span><text:span text:style-name="T2">maintena</text:span><text:span text:style-name="T2">nce to </text:span><text:span text:style-name="T2">MHI high </text:span><text:span text:style-name="T2">wall heat </text:span><text:span text:style-name="T2">pump in </text:span><text:span text:style-name="T2">Side </text:span><text:span text:style-name="T2">Meeting </text:span><text:span text:style-name="T2">Room.</text:span></text:p>
          </draw:text-box>
        </draw:frame>
        <draw:frame draw:style-name="gr3" draw:text-style-name="P4" draw:layer="layout" svg:width="11.305cm" svg:height="0.433cm" svg:x="1.1cm" svg:y="18.656cm">
          <draw:text-box>
            <text:p text:style-name="P2"><text:span text:style-name="T2">20/02/15 - </text:span><text:span text:style-name="T2">Carried </text:span><text:span text:style-name="T2">out 30 </text:span><text:span text:style-name="T2">point </text:span><text:span text:style-name="T2">check, </text:span><text:span text:style-name="T2">found </text:span><text:span text:style-name="T2">filters </text:span><text:span text:style-name="T2">dirty, </text:span><text:span text:style-name="T2">indoor </text:span><text:span text:style-name="T2">unit coil </text:span><text:span text:style-name="T2">OK,</text:span></text:p>
          </draw:text-box>
        </draw:frame>
        <draw:frame draw:style-name="gr3" draw:text-style-name="P4" draw:layer="layout" svg:width="10.941cm" svg:height="0.433cm" svg:x="1.1cm" svg:y="19.037cm">
          <draw:text-box>
            <text:p text:style-name="P2"><text:span text:style-name="T2">drum fan </text:span><text:span text:style-name="T2">blade and </text:span><text:span text:style-name="T2">cowling </text:span><text:span text:style-name="T2">dirty. </text:span><text:span text:style-name="T2">Outdoor </text:span><text:span text:style-name="T2">unit had </text:span><text:span text:style-name="T2">debris </text:span><text:span text:style-name="T2">inside the </text:span><text:span text:style-name="T2">unit</text:span></text:p>
          </draw:text-box>
        </draw:frame>
        <draw:frame draw:style-name="gr3" draw:text-style-name="P4" draw:layer="layout" svg:width="11.119cm" svg:height="0.433cm" svg:x="1.1cm" svg:y="19.418cm">
          <draw:text-box>
            <text:p text:style-name="P2"><text:span text:style-name="T2">partially </text:span><text:span text:style-name="T2">blocking </text:span><text:span text:style-name="T2">the drain </text:span><text:span text:style-name="T2">channel, </text:span><text:span text:style-name="T2">found </text:span><text:span text:style-name="T2">drain </text:span><text:span text:style-name="T2">elbow </text:span><text:span text:style-name="T2">completel</text:span><text:span text:style-name="T2">y blocked</text:span></text:p>
          </draw:text-box>
        </draw:frame>
        <draw:frame draw:style-name="gr3" draw:text-style-name="P4" draw:layer="layout" svg:width="11.076cm" svg:height="0.433cm" svg:x="1.1cm" svg:y="19.799cm">
          <draw:text-box>
            <text:p text:style-name="P2"><text:span text:style-name="T2">with </text:span><text:span text:style-name="T2">sludge. </text:span><text:span text:style-name="T2">Removed </text:span><text:span text:style-name="T2">covers </text:span><text:span text:style-name="T2">and </text:span><text:span text:style-name="T2">filters, </text:span><text:span text:style-name="T2">scrubbed, </text:span><text:span text:style-name="T2">washed </text:span><text:span text:style-name="T2">and left to </text:span><text:span text:style-name="T2">dry.</text:span></text:p>
          </draw:text-box>
        </draw:frame>
        <draw:frame draw:style-name="gr3" draw:text-style-name="P4" draw:layer="layout" svg:width="10.53cm" svg:height="0.433cm" svg:x="1.1cm" svg:y="20.18cm">
          <draw:text-box>
            <text:p text:style-name="P2"><text:span text:style-name="T2">Removed </text:span><text:span text:style-name="T2">top cover </text:span><text:span text:style-name="T2">from </text:span><text:span text:style-name="T2">outdoor </text:span><text:span text:style-name="T2">unit and </text:span><text:span text:style-name="T2">removed </text:span><text:span text:style-name="T2">debris </text:span><text:span text:style-name="T2">from </text:span><text:span text:style-name="T2">inside</text:span></text:p>
          </draw:text-box>
        </draw:frame>
        <draw:frame draw:style-name="gr3" draw:text-style-name="P4" draw:layer="layout" svg:width="11.614cm" svg:height="0.433cm" svg:x="1.1cm" svg:y="20.561cm">
          <draw:text-box>
            <text:p text:style-name="P2"><text:span text:style-name="T2">outdoor </text:span><text:span text:style-name="T2">unit </text:span><text:span text:style-name="T2">around </text:span><text:span text:style-name="T2">and under </text:span><text:span text:style-name="T2">outdoor </text:span><text:span text:style-name="T2">unit. </text:span><text:span text:style-name="T2">Applied </text:span><text:span text:style-name="T2">coil </text:span><text:span text:style-name="T2">cleaner </text:span><text:span text:style-name="T2">and </text:span><text:span text:style-name="T2">washed</text:span></text:p>
          </draw:text-box>
        </draw:frame>
        <draw:frame draw:style-name="gr3" draw:text-style-name="P4" draw:layer="layout" svg:width="11cm" svg:height="0.433cm" svg:x="1.1cm" svg:y="20.942cm">
          <draw:text-box>
            <text:p text:style-name="P2"><text:span text:style-name="T2">coil and </text:span><text:span text:style-name="T2">fan blade </text:span><text:span text:style-name="T2">and fan </text:span><text:span text:style-name="T2">blade </text:span><text:span text:style-name="T2">cover. </text:span><text:span text:style-name="T2">Removed </text:span><text:span text:style-name="T2">drain </text:span><text:span text:style-name="T2">elbow and </text:span><text:span text:style-name="T2">cleared,</text:span></text:p>
          </draw:text-box>
        </draw:frame>
        <draw:frame draw:style-name="gr3" draw:text-style-name="P4" draw:layer="layout" svg:width="10.975cm" svg:height="0.433cm" svg:x="1.1cm" svg:y="21.323cm">
          <draw:text-box>
            <text:p text:style-name="P2"><text:span text:style-name="T2">flushed </text:span><text:span text:style-name="T2">out drain </text:span><text:span text:style-name="T2">and </text:span><text:span text:style-name="T2">channel. </text:span><text:span text:style-name="T2">Fitted </text:span><text:span text:style-name="T2">back top </text:span><text:span text:style-name="T2">cover and </text:span><text:span text:style-name="T2">secured. </text:span><text:span text:style-name="T2">Applied</text:span></text:p>
          </draw:text-box>
        </draw:frame>
        <draw:frame draw:style-name="gr3" draw:text-style-name="P4" draw:layer="layout" svg:width="10.831cm" svg:height="0.433cm" svg:x="1.1cm" svg:y="21.704cm">
          <draw:text-box>
            <text:p text:style-name="P2"><text:span text:style-name="T2">coil </text:span><text:span text:style-name="T2">cleaner, </text:span><text:span text:style-name="T2">washed </text:span><text:span text:style-name="T2">indoor </text:span><text:span text:style-name="T2">coil, and </text:span><text:span text:style-name="T2">scrubbed </text:span><text:span text:style-name="T2">coil </text:span><text:span text:style-name="T2">thoroughl</text:span><text:span text:style-name="T2">y. Using </text:span><text:span text:style-name="T2">coil</text:span></text:p>
          </draw:text-box>
        </draw:frame>
        <draw:frame draw:style-name="gr3" draw:text-style-name="P4" draw:layer="layout" svg:width="11.521cm" svg:height="0.433cm" svg:x="1.1cm" svg:y="22.085cm">
          <draw:text-box>
            <text:p text:style-name="P2"><text:span text:style-name="T2">cleaner </text:span><text:span text:style-name="T2">washed </text:span><text:span text:style-name="T2">drum fan </text:span><text:span text:style-name="T2">blade and </text:span><text:span text:style-name="T2">flushed </text:span><text:span text:style-name="T2">out drain </text:span><text:span text:style-name="T2">and made </text:span><text:span text:style-name="T2">sure </text:span><text:span text:style-name="T2">flowing</text:span></text:p>
          </draw:text-box>
        </draw:frame>
        <draw:frame draw:style-name="gr3" draw:text-style-name="P4" draw:layer="layout" svg:width="10.636cm" svg:height="0.433cm" svg:x="1.1cm" svg:y="22.466cm">
          <draw:text-box>
            <text:p text:style-name="P2"><text:span text:style-name="T2">clear, </text:span><text:span text:style-name="T2">applied </text:span><text:span text:style-name="T2">coil </text:span><text:span text:style-name="T2">deodorize</text:span><text:span text:style-name="T2">r to coil.. </text:span><text:span text:style-name="T2">Fitted </text:span><text:span text:style-name="T2">back all </text:span><text:span text:style-name="T2">covers </text:span><text:span text:style-name="T2">and </text:span><text:span text:style-name="T2">secured.</text:span></text:p>
          </draw:text-box>
        </draw:frame>
        <draw:frame draw:style-name="gr3" draw:text-style-name="P4" draw:layer="layout" svg:width="10.996cm" svg:height="0.433cm" svg:x="1.1cm" svg:y="22.847cm">
          <draw:text-box>
            <text:p text:style-name="P2"><text:span text:style-name="T2">Checked </text:span><text:span text:style-name="T2">operation </text:span><text:span text:style-name="T2">heating </text:span><text:span text:style-name="T2">45 </text:span><text:span text:style-name="T2">degrees / </text:span><text:span text:style-name="T2">cooling 12 </text:span><text:span text:style-name="T2">degrees. </text:span><text:span text:style-name="T2">Working, </text:span><text:span text:style-name="T2">but</text:span></text:p>
          </draw:text-box>
        </draw:frame>
        <draw:frame draw:style-name="gr3" draw:text-style-name="P4" draw:layer="layout" svg:width="4.858cm" svg:height="0.433cm" svg:x="1.1cm" svg:y="23.228cm">
          <draw:text-box>
            <text:p text:style-name="P2"><text:span text:style-name="T2">not as </text:span><text:span text:style-name="T2">efficiently </text:span><text:span text:style-name="T2">as it </text:span><text:span text:style-name="T2">should </text:span><text:span text:style-name="T2">be .</text:span></text:p>
          </draw:text-box>
        </draw:frame>
        <draw:frame draw:style-name="gr3" draw:text-style-name="P4" draw:layer="layout" svg:width="8.545cm" svg:height="0.433cm" svg:x="1.1cm" svg:y="23.99cm">
          <draw:text-box>
            <text:p text:style-name="P2"><text:span text:style-name="T2">* I would </text:span><text:span text:style-name="T2">recomme</text:span><text:span text:style-name="T2">nd filters </text:span><text:span text:style-name="T2">be </text:span><text:span text:style-name="T2">cleaned </text:span><text:span text:style-name="T2">every 3 </text:span><text:span text:style-name="T2">months *</text:span></text:p>
          </draw:text-box>
        </draw:frame>
        <draw:frame draw:style-name="gr3" draw:text-style-name="P4" draw:layer="layout" svg:width="0.629cm" svg:height="0.433cm" svg:x="13.581cm" svg:y="17.894cm">
          <draw:text-box>
            <text:p text:style-name="P2"><text:span text:style-name="T2">1.00</text:span></text:p>
          </draw:text-box>
        </draw:frame>
        <draw:frame draw:style-name="gr3" draw:text-style-name="P4" draw:layer="layout" svg:width="0.993cm" svg:height="0.433cm" svg:x="16.078cm" svg:y="17.894cm">
          <draw:text-box>
            <text:p text:style-name="P2"><text:span text:style-name="T2">110.00</text:span></text:p>
          </draw:text-box>
        </draw:frame>
        <draw:frame draw:style-name="gr3" draw:text-style-name="P4" draw:layer="layout" svg:width="0.993cm" svg:height="0.433cm" svg:x="18.928cm" svg:y="17.894cm">
          <draw:text-box>
            <text:p text:style-name="P2"><text:span text:style-name="T2">110.00</text:span></text:p>
          </draw:text-box>
        </draw:frame>
        <draw:frame draw:style-name="gr3" draw:text-style-name="P4" draw:layer="layout" svg:width="4.1cm" svg:height="0.433cm" svg:x="1.1cm" svg:y="24.797cm">
          <draw:text-box>
            <text:p text:style-name="P2"><text:span text:style-name="T2">Coil </text:span><text:span text:style-name="T2">cleaner </text:span><text:span text:style-name="T2">and </text:span><text:span text:style-name="T2">deodorize</text:span><text:span text:style-name="T2">r</text:span></text:p>
          </draw:text-box>
        </draw:frame>
        <draw:frame draw:style-name="gr3" draw:text-style-name="P4" draw:layer="layout" svg:width="0.629cm" svg:height="0.433cm" svg:x="13.581cm" svg:y="24.797cm">
          <draw:text-box>
            <text:p text:style-name="P2"><text:span text:style-name="T2">2.00</text:span></text:p>
          </draw:text-box>
        </draw:frame>
        <draw:frame draw:style-name="gr3" draw:text-style-name="P4" draw:layer="layout" svg:width="0.811cm" svg:height="0.433cm" svg:x="16.254cm" svg:y="24.797cm">
          <draw:text-box>
            <text:p text:style-name="P2"><text:span text:style-name="T2">10.00</text:span></text:p>
          </draw:text-box>
        </draw:frame>
        <draw:line draw:style-name="gr4" draw:text-style-name="P1" draw:layer="layout" svg:x1="0.999cm" svg:y1="10.812cm" svg:x2="12.019cm" svg:y2="10.812cm">
          <text:p/>
        </draw:line>
        <draw:line draw:style-name="gr4" draw:text-style-name="P1" draw:layer="layout" svg:x1="12.019cm" svg:y1="10.812cm" svg:x2="14.299cm" svg:y2="10.812cm">
          <text:p/>
        </draw:line>
        <draw:line draw:style-name="gr4" draw:text-style-name="P1" draw:layer="layout" svg:x1="14.299cm" svg:y1="10.812cm" svg:x2="17.148cm" svg:y2="10.812cm">
          <text:p/>
        </draw:line>
        <draw:line draw:style-name="gr4" draw:text-style-name="P1" draw:layer="layout" svg:x1="17.148cm" svg:y1="10.812cm" svg:x2="19.998cm" svg:y2="10.812cm">
          <text:p/>
        </draw:line>
        <draw:line draw:style-name="gr5" draw:text-style-name="P1" draw:layer="layout" svg:x1="0.999cm" svg:y1="17.702cm" svg:x2="12.019cm" svg:y2="17.702cm">
          <text:p/>
        </draw:line>
        <draw:line draw:style-name="gr5" draw:text-style-name="P1" draw:layer="layout" svg:x1="12.019cm" svg:y1="17.702cm" svg:x2="14.299cm" svg:y2="17.702cm">
          <text:p/>
        </draw:line>
        <draw:line draw:style-name="gr5" draw:text-style-name="P1" draw:layer="layout" svg:x1="14.299cm" svg:y1="17.702cm" svg:x2="17.148cm" svg:y2="17.702cm">
          <text:p/>
        </draw:line>
        <draw:line draw:style-name="gr5" draw:text-style-name="P1" draw:layer="layout" svg:x1="17.148cm" svg:y1="17.702cm" svg:x2="19.998cm" svg:y2="17.702cm">
          <text:p/>
        </draw:line>
        <draw:line draw:style-name="gr5" draw:text-style-name="P1" draw:layer="layout" svg:x1="0.999cm" svg:y1="24.606cm" svg:x2="12.019cm" svg:y2="24.606cm">
          <text:p/>
        </draw:line>
        <draw:line draw:style-name="gr5" draw:text-style-name="P1" draw:layer="layout" svg:x1="12.019cm" svg:y1="24.606cm" svg:x2="14.299cm" svg:y2="24.606cm">
          <text:p/>
        </draw:line>
        <draw:line draw:style-name="gr5" draw:text-style-name="P1" draw:layer="layout" svg:x1="14.299cm" svg:y1="24.606cm" svg:x2="17.148cm" svg:y2="24.606cm">
          <text:p/>
        </draw:line>
        <draw:line draw:style-name="gr5" draw:text-style-name="P1" draw:layer="layout" svg:x1="17.148cm" svg:y1="24.606cm" svg:x2="19.998cm" svg:y2="24.606cm">
          <text:p/>
        </draw:line>
        <draw:line draw:style-name="gr5" draw:text-style-name="P1" draw:layer="layout" svg:x1="0.999cm" svg:y1="25.413cm" svg:x2="12.019cm" svg:y2="25.413cm">
          <text:p/>
        </draw:line>
        <draw:line draw:style-name="gr5" draw:text-style-name="P1" draw:layer="layout" svg:x1="12.019cm" svg:y1="25.413cm" svg:x2="14.299cm" svg:y2="25.413cm">
          <text:p/>
        </draw:line>
        <draw:line draw:style-name="gr5" draw:text-style-name="P1" draw:layer="layout" svg:x1="14.299cm" svg:y1="25.413cm" svg:x2="17.148cm" svg:y2="25.413cm">
          <text:p/>
        </draw:line>
        <draw:line draw:style-name="gr5" draw:text-style-name="P1" draw:layer="layout" svg:x1="17.148cm" svg:y1="25.413cm" svg:x2="19.998cm" svg:y2="25.413cm">
          <text:p/>
        </draw:line>
        <draw:frame draw:style-name="gr3" draw:text-style-name="P4" draw:layer="layout" svg:width="0.811cm" svg:height="0.433cm" svg:x="19.104cm" svg:y="24.797cm">
          <draw:text-box>
            <text:p text:style-name="P2"><text:span text:style-name="T2">20.00</text:span></text:p>
          </draw:text-box>
        </draw:frame>
        <draw:frame draw:style-name="gr3" draw:text-style-name="P4" draw:layer="layout" svg:width="1.247cm" svg:height="0.433cm" svg:x="15.884cm" svg:y="25.605cm">
          <draw:text-box>
            <text:p text:style-name="P2"><text:span text:style-name="T2">Subtotal</text:span></text:p>
          </draw:text-box>
        </draw:frame>
        <draw:frame draw:style-name="gr3" draw:text-style-name="P4" draw:layer="layout" svg:width="0.993cm" svg:height="0.433cm" svg:x="18.928cm" svg:y="25.605cm">
          <draw:text-box>
            <text:p text:style-name="P2"><text:span text:style-name="T2">260.00</text:span></text:p>
          </draw:text-box>
        </draw:frame>
        <draw:frame draw:style-name="gr3" draw:text-style-name="P4" draw:layer="layout" svg:width="2.508cm" svg:height="0.433cm" svg:x="14.385cm" svg:y="26.386cm">
          <draw:text-box>
            <text:p text:style-name="P2"><text:span text:style-name="T2">TOTAL <text:s/></text:span><text:span text:style-name="T2">GST <text:s/>15%</text:span></text:p>
          </draw:text-box>
        </draw:frame>
        <draw:frame draw:style-name="gr3" draw:text-style-name="P4" draw:layer="layout" svg:width="0.811cm" svg:height="0.433cm" svg:x="19.104cm" svg:y="26.386cm">
          <draw:text-box>
            <text:p text:style-name="P2"><text:span text:style-name="T2">39.00</text:span></text:p>
          </draw:text-box>
        </draw:frame>
      </draw:page>
      <draw:page draw:name="page2" draw:style-name="dp1" draw:master-page-name="master-page26">
        <draw:frame draw:style-name="gr1" draw:text-style-name="P1" draw:layer="layout" svg:width="18.898cm" svg:height="0.346cm" svg:x="1cm" svg:y="22.427cm">
          <draw:image xlink:href="Pictures/10000001000008B6000000290987DF02.png" xlink:type="simple" xlink:show="embed" xlink:actuate="onLoad" draw:mime-type="image/png">
            <text:p/>
          </draw:image>
        </draw:frame>
        <draw:frame draw:style-name="gr2" draw:text-style-name="P3" draw:layer="layout" svg:width="7.067cm" svg:height="1.157cm" svg:x="1.1cm" svg:y="22.87cm">
          <draw:text-box>
            <text:p text:style-name="P2"><text:span text:style-name="T1">P</text:span><text:span text:style-name="T1">A</text:span><text:span text:style-name="T1">Y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D</text:span><text:span text:style-name="T1">V</text:span><text:span text:style-name="T1">I</text:span><text:span text:style-name="T1">C</text:span><text:span text:style-name="T1">E</text:span></text:p>
          </draw:text-box>
        </draw:frame>
        <draw:frame draw:style-name="gr3" draw:text-style-name="P4" draw:layer="layout" svg:width="0.455cm" svg:height="0.433cm" svg:x="2.1cm" svg:y="23.956cm">
          <draw:text-box>
            <text:p text:style-name="P2"><text:span text:style-name="T2">To:</text:span></text:p>
          </draw:text-box>
        </draw:frame>
        <draw:frame draw:style-name="gr3" draw:text-style-name="P4" draw:layer="layout" svg:width="2.915cm" svg:height="0.433cm" svg:x="2.7cm" svg:y="23.962cm">
          <draw:text-box>
            <text:p text:style-name="P2"><text:span text:style-name="T2">Active </text:span><text:span text:style-name="T2">Maintenance</text:span></text:p>
          </draw:text-box>
        </draw:frame>
        <draw:frame draw:style-name="gr3" draw:text-style-name="P4" draw:layer="layout" svg:width="3.139cm" svg:height="0.433cm" svg:x="2.7cm" svg:y="24.421cm">
          <draw:text-box>
            <text:p text:style-name="P2"><text:span text:style-name="T2">21 </text:span><text:span text:style-name="T2">Waymouth </text:span><text:span text:style-name="T2">Street,</text:span></text:p>
          </draw:text-box>
        </draw:frame>
        <draw:frame draw:style-name="gr3" draw:text-style-name="P4" draw:layer="layout" svg:width="3.698cm" svg:height="0.433cm" svg:x="2.7cm" svg:y="24.879cm">
          <draw:text-box>
            <text:p text:style-name="P2"><text:span text:style-name="T2">Fairto</text:span><text:span text:style-name="T2">n, </text:span><text:span text:style-name="T2">Ashbu</text:span><text:span text:style-name="T2">rton, </text:span><text:span text:style-name="T2">7700</text:span></text:p>
          </draw:text-box>
        </draw:frame>
        <draw:frame draw:style-name="gr3" draw:text-style-name="P4" draw:layer="layout" svg:width="2.169cm" svg:height="0.433cm" svg:x="2.7cm" svg:y="25.338cm">
          <draw:text-box>
            <text:p text:style-name="P2"><text:span text:style-name="T2">M </text:span><text:span text:style-name="T2">021 </text:span><text:span text:style-name="T2">483 </text:span><text:span text:style-name="T2">376</text:span></text:p>
          </draw:text-box>
        </draw:frame>
        <draw:frame draw:style-name="gr3" draw:text-style-name="P4" draw:layer="layout" svg:width="3.677cm" svg:height="0.433cm" svg:x="2.7cm" svg:y="25.797cm">
          <draw:text-box>
            <text:p text:style-name="P2"><text:span text:style-name="T2">E steven@active.mbol.nz</text:span></text:p>
          </draw:text-box>
        </draw:frame>
        <draw:frame draw:style-name="gr3" draw:text-style-name="P4" draw:layer="layout" svg:width="2.525cm" svg:height="0.433cm" svg:x="2.7cm" svg:y="26.255cm">
          <draw:text-box>
            <text:p text:style-name="P2"><text:span text:style-name="T2">W </text:span><text:span text:style-name="T2">active.mbol.n</text:span><text:span text:style-name="T2">z</text:span></text:p>
          </draw:text-box>
        </draw:frame>
        <draw:frame draw:style-name="gr3" draw:text-style-name="P4" draw:layer="layout" svg:width="1.547cm" svg:height="0.433cm" svg:x="12.099cm" svg:y="22.907cm">
          <draw:text-box>
            <text:p text:style-name="P2"><text:span text:style-name="T3">Customer</text:span></text:p>
          </draw:text-box>
        </draw:frame>
        <draw:frame draw:style-name="gr3" draw:text-style-name="P4" draw:layer="layout" svg:width="4.058cm" svg:height="0.433cm" svg:x="15.099cm" svg:y="22.907cm">
          <draw:text-box>
            <text:p text:style-name="P2"><text:span text:style-name="T2">Ashburton Kingdom Hall of</text:span></text:p>
          </draw:text-box>
        </draw:frame>
        <draw:frame draw:style-name="gr3" draw:text-style-name="P4" draw:layer="layout" svg:width="2.999cm" svg:height="0.433cm" svg:x="15.099cm" svg:y="23.288cm">
          <draw:text-box>
            <text:p text:style-name="P2"><text:span text:style-name="T2">Jehovah's Witnesses</text:span></text:p>
          </draw:text-box>
        </draw:frame>
        <draw:frame draw:style-name="gr3" draw:text-style-name="P4" draw:layer="layout" svg:width="2.55cm" svg:height="0.433cm" svg:x="12.099cm" svg:y="23.769cm">
          <draw:text-box>
            <text:p text:style-name="P2"><text:span text:style-name="T3">Invoice Number</text:span></text:p>
          </draw:text-box>
        </draw:frame>
        <draw:frame draw:style-name="gr3" draw:text-style-name="P4" draw:layer="layout" svg:width="1.729cm" svg:height="0.433cm" svg:x="15.099cm" svg:y="23.769cm">
          <draw:text-box>
            <text:p text:style-name="P2"><text:span text:style-name="T2">INV-000719</text:span></text:p>
          </draw:text-box>
        </draw:frame>
        <draw:frame draw:style-name="gr3" draw:text-style-name="P4" draw:layer="layout" svg:width="1.996cm" svg:height="0.433cm" svg:x="12.099cm" svg:y="24.377cm">
          <draw:text-box>
            <text:p text:style-name="P2"><text:span text:style-name="T3">Amount Due</text:span></text:p>
          </draw:text-box>
        </draw:frame>
        <draw:frame draw:style-name="gr3" draw:text-style-name="P4" draw:layer="layout" svg:width="0.997cm" svg:height="0.433cm" svg:x="15.099cm" svg:y="24.377cm">
          <draw:text-box>
            <text:p text:style-name="P2"><text:span text:style-name="T3">299.00</text:span></text:p>
          </draw:text-box>
        </draw:frame>
        <draw:frame draw:style-name="gr3" draw:text-style-name="P4" draw:layer="layout" svg:width="1.467cm" svg:height="0.433cm" svg:x="12.099cm" svg:y="24.858cm">
          <draw:text-box>
            <text:p text:style-name="P2"><text:span text:style-name="T3">Due Date</text:span></text:p>
          </draw:text-box>
        </draw:frame>
        <draw:frame draw:style-name="gr3" draw:text-style-name="P4" draw:layer="layout" svg:width="1.793cm" svg:height="0.433cm" svg:x="15.099cm" svg:y="24.858cm">
          <draw:text-box>
            <text:p text:style-name="P2"><text:span text:style-name="T2">27 Feb 2025</text:span></text:p>
          </draw:text-box>
        </draw:frame>
        <draw:frame draw:style-name="gr3" draw:text-style-name="P4" draw:layer="layout" svg:width="2.754cm" svg:height="0.433cm" svg:x="12.099cm" svg:y="25.465cm">
          <draw:text-box>
            <text:p text:style-name="P2"><text:span text:style-name="T3">Amount Enclosed</text:span></text:p>
          </draw:text-box>
        </draw:frame>
        <draw:frame draw:style-name="gr3" draw:text-style-name="P4" draw:layer="layout" svg:width="0.317cm" svg:height="0.433cm" svg:x="15.099cm" svg:y="25.465cm">
          <draw:text-box>
            <text:p text:style-name="P2"><text:span text:style-name="T2"><text:s/></text:span></text:p>
          </draw:text-box>
        </draw:frame>
        <draw:line draw:style-name="gr5" draw:text-style-name="P1" draw:layer="layout" svg:x1="11.999cm" svg:y1="24.285cm" svg:x2="14.999cm" svg:y2="24.285cm">
          <text:p/>
        </draw:line>
        <draw:line draw:style-name="gr5" draw:text-style-name="P1" draw:layer="layout" svg:x1="14.999cm" svg:y1="24.285cm" svg:x2="19.998cm" svg:y2="24.285cm">
          <text:p/>
        </draw:line>
        <draw:line draw:style-name="gr5" draw:text-style-name="P1" draw:layer="layout" svg:x1="11.999cm" svg:y1="25.374cm" svg:x2="14.999cm" svg:y2="25.374cm">
          <text:p/>
        </draw:line>
        <draw:line draw:style-name="gr5" draw:text-style-name="P1" draw:layer="layout" svg:x1="14.999cm" svg:y1="25.374cm" svg:x2="19.998cm" svg:y2="25.374cm">
          <text:p/>
        </draw:line>
        <draw:line draw:style-name="gr4" draw:text-style-name="P1" draw:layer="layout" svg:x1="14.999cm" svg:y1="25.981cm" svg:x2="19.998cm" svg:y2="25.981cm">
          <text:p/>
        </draw:line>
        <draw:frame draw:style-name="gr6" draw:text-style-name="P5" draw:layer="layout" svg:width="5.281cm" svg:height="0.391cm" svg:x="15.057cm" svg:y="26.075cm">
          <draw:text-box>
            <text:p text:style-name="P2"><text:span text:style-name="T4">Enter the </text:span><text:span text:style-name="T4">amount you </text:span><text:span text:style-name="T4">are paying </text:span><text:span text:style-name="T4">above</text:span></text:p>
          </draw:text-box>
        </draw:frame>
        <draw:frame draw:style-name="gr3" draw:text-style-name="P4" draw:layer="layout" svg:width="1.78cm" svg:height="0.433cm" svg:x="15.285cm" svg:y="1.554cm">
          <draw:text-box>
            <text:p text:style-name="P2"><text:span text:style-name="T3">TOTAL </text:span><text:span text:style-name="T3">NZD</text:span></text:p>
          </draw:text-box>
        </draw:frame>
        <draw:line draw:style-name="gr4" draw:text-style-name="P1" draw:layer="layout" svg:x1="11.449cm" svg:y1="1.363cm" svg:x2="17.148cm" svg:y2="1.363cm">
          <text:p/>
        </draw:line>
        <draw:line draw:style-name="gr4" draw:text-style-name="P1" draw:layer="layout" svg:x1="17.148cm" svg:y1="1.363cm" svg:x2="19.998cm" svg:y2="1.363cm">
          <text:p/>
        </draw:line>
        <draw:frame draw:style-name="gr3" draw:text-style-name="P4" draw:layer="layout" svg:width="0.997cm" svg:height="0.433cm" svg:x="18.928cm" svg:y="1.554cm">
          <draw:text-box>
            <text:p text:style-name="P2"><text:span text:style-name="T3">299.00</text:span></text:p>
          </draw:text-box>
        </draw:frame>
        <draw:frame draw:style-name="gr7" draw:text-style-name="P6" draw:layer="layout" svg:width="4.146cm" svg:height="0.517cm" svg:x="1cm" svg:y="3.131cm">
          <draw:text-box>
            <text:p text:style-name="P2"><text:span text:style-name="T5">Due </text:span><text:span text:style-name="T5">Date: 27 </text:span><text:span text:style-name="T5">Feb </text:span><text:span text:style-name="T5">2025</text:span></text:p>
          </draw:text-box>
        </draw:frame>
        <draw:frame draw:style-name="gr3" draw:text-style-name="P4" draw:layer="layout" svg:width="4.299cm" svg:height="0.433cm" svg:x="1cm" svg:y="3.592cm">
          <draw:text-box>
            <text:p text:style-name="P2"><text:span text:style-name="T2">Thank you </text:span><text:span text:style-name="T2">for your </text:span><text:span text:style-name="T2">business.</text:span></text:p>
          </draw:text-box>
        </draw:frame>
        <draw:frame draw:style-name="gr3" draw:text-style-name="P4" draw:layer="layout" svg:width="6.949cm" svg:height="0.433cm" svg:x="1cm" svg:y="3.973cm">
          <draw:text-box>
            <text:p text:style-name="P2"><text:span text:style-name="T2">Please </text:span><text:span text:style-name="T2">make the </text:span><text:span text:style-name="T2">payment </text:span><text:span text:style-name="T2">in the </text:span><text:span text:style-name="T2">bank </text:span><text:span text:style-name="T2">account:</text:span></text:p>
          </draw:text-box>
        </draw:frame>
        <draw:frame draw:style-name="gr3" draw:text-style-name="P4" draw:layer="layout" svg:width="2.915cm" svg:height="0.433cm" svg:x="1cm" svg:y="4.354cm">
          <draw:text-box>
            <text:p text:style-name="P2"><text:span text:style-name="T2">Active </text:span><text:span text:style-name="T2">Maintena</text:span><text:span text:style-name="T2">nce</text:span></text:p>
          </draw:text-box>
        </draw:frame>
        <draw:frame draw:style-name="gr3" draw:text-style-name="P4" draw:layer="layout" svg:width="3.029cm" svg:height="0.433cm" svg:x="1cm" svg:y="4.735cm">
          <draw:text-box>
            <text:p text:style-name="P2"><text:span text:style-name="T2">01-0190-</text:span><text:span text:style-name="T2">0564535-</text:span><text:span text:style-name="T2">00</text:span></text:p>
          </draw:text-box>
        </draw:frame>
        <draw:frame draw:style-name="gr3" draw:text-style-name="P4" draw:layer="layout" svg:width="6.267cm" svg:height="0.433cm" svg:x="1cm" svg:y="5.116cm">
          <draw:text-box>
            <text:p text:style-name="P2"><text:span text:style-name="T2">Please </text:span><text:span text:style-name="T2">enter </text:span><text:span text:style-name="T2">invoice </text:span><text:span text:style-name="T2">number </text:span><text:span text:style-name="T2">as </text:span><text:span text:style-name="T2">reference.</text:span></text:p>
          </draw:text-box>
        </draw:frame>
        <draw:frame draw:style-name="gr8" draw:text-style-name="P7" draw:layer="layout" svg:width="5.019cm" svg:height="2.026cm" svg:x="1.631cm" svg:y="16.8cm">
          <draw:image xlink:href="Pictures/1000000100000142000000823BEA4DB2.png" xlink:type="simple" xlink:show="embed" xlink:actuate="onLoad" draw:mime-type="image/png">
            <text:p/>
          </draw:image>
        </draw:frame>
        <draw:frame draw:style-name="gr9" draw:text-style-name="P8" draw:layer="layout" svg:width="6.725cm" svg:height="1.873cm" svg:x="1.65cm" svg:y="18.55cm">
          <draw:text-box>
            <text:p>APPROVED BY:</text:p>
            <text:p>Adamson dela Cruz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UnicodeMS" svg:font-family="ArialUnicodeM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.9cm" fo:margin-right="1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17:39:16.955355153</dc:date>
    <meta:editing-duration>PT13M48S</meta:editing-duration>
    <meta:editing-cycles>1</meta:editing-cycles>
    <meta:document-statistic meta:object-count="119"/>
    <meta:generator>LibreOffice/24.2.7.2$Linux_X86_64 LibreOffice_project/420$Build-2</meta:generator>
  </office:meta>
</office:document-meta>
</file>